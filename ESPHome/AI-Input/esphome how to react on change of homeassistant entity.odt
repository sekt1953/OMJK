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officeooo:paragraph-rsid="000d301e"/>
    </style:style>
    <style:style style:name="P2" style:family="paragraph" style:parent-style-name="Heading_20_1" style:master-page-name="Standard">
      <style:paragraph-properties fo:margin-left="0cm" fo:margin-right="0cm" fo:text-indent="0cm" style:auto-text-indent="false" style:page-number="auto" fo:padding="0cm" fo:border="none"/>
    </style:style>
    <style:style style:name="P3" style:family="paragraph" style:parent-style-name="Horizontal_20_Line">
      <style:paragraph-properties style:writing-mode="lr-tb"/>
      <style:text-properties officeooo:paragraph-rsid="000d301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 style:writing-mode="lr-tb"/>
    </style:style>
    <style:style style:name="P6" style:family="paragraph" style:parent-style-name="Preformatted_20_Text">
      <style:paragraph-properties fo:padding="0cm" fo:border="none" style:writing-mode="lr-tb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" style:family="paragraph" style:parent-style-name="Text_20_body">
      <style:paragraph-properties fo:margin-left="0cm" fo:margin-right="0.212cm" fo:margin-top="0cm" fo:margin-bottom="0cm" style:contextual-spacing="false" fo:text-indent="0cm" style:auto-text-indent="false" style:writing-mode="lr-tb"/>
    </style:style>
    <style:style style:name="P9" style:family="paragraph" style:parent-style-name="Text_20_body">
      <style:paragraph-properties fo:margin-left="2.831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loext:padding="0cm" loext:border="none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0d301e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d301e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0d301e"/>
    </style:style>
    <style:style style:name="P17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officeooo:paragraph-rsid="000d301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d301e"/>
    </style:style>
    <style:style style:name="P19" style:family="paragraph" style:parent-style-name="Text_20_body">
      <style:paragraph-properties fo:margin-left="0cm" fo:margin-right="0.212cm" fo:margin-top="0cm" fo:margin-bottom="0cm" style:contextual-spacing="false" fo:text-indent="0cm" style:auto-text-indent="false" style:writing-mode="lr-tb"/>
      <style:text-properties officeooo:paragraph-rsid="000d301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amtale i AI-tilstand: esphome how to react on change of homeassistant entity</text:h>
      <text:p text:style-name="P9">Du sagde: esphome how to react on change of homeassistant entity</text:p>
      <text:p text:style-name="P18"><text:span text:style-name="T1">To react to changes of a Home Assistant entity inside ESPHome, you must </text:span><text:span text:style-name="Strong_20_Emphasis"><text:span text:style-name="T1">import the entity as a tracking component using the </text:span></text:span><text:span text:style-name="Source_20_Text"><text:span text:style-name="T1">homeassistant</text:span></text:span><text:span text:style-name="Strong_20_Emphasis"><text:span text:style-name="T1"> platform platform</text:span></text:span><text:span text:style-name="T1"> and attach an automated </text:span><text:span text:style-name="Source_20_Text"><text:span text:style-name="T1">on_value</text:span></text:span><text:span text:style-name="T1"> or </text:span><text:span text:style-name="Source_20_Text"><text:span text:style-name="T1">on_state</text:span></text:span><text:span text:style-name="T1"> trigger. [</text:span><text:a xlink:type="simple" xlink:href="https://community.home-assistant.io/t/change-ha-entity-from-esphome/968118" text:style-name="Internet_20_link" text:visited-style-name="Visited_20_Internet_20_Link"><text:span text:style-name="T1">1</text:span></text:a><text:span text:style-name="T1">, </text:span><text:a xlink:type="simple" xlink:href="https://esphome.io/components/sensor/homeassistant/" text:style-name="Internet_20_link" text:visited-style-name="Visited_20_Internet_20_Link"><text:span text:style-name="T1">2</text:span></text:a><text:span text:style-name="T1">, </text:span><text:a xlink:type="simple" xlink:href="https://esphome.io/changelog/v1.20.0/" text:style-name="Internet_20_link" text:visited-style-name="Visited_20_Internet_20_Link"><text:span text:style-name="T1">3</text:span></text:a><text:span text:style-name="T1">]</text:span></text:p>
      <text:p text:style-name="P18"><text:span text:style-name="T1">This method uses the native </text:span><text:a xlink:type="simple" xlink:href="https://esphome.io/components/api/" office:target-frame-name="_blank" xlink:show="new" text:style-name="Internet_20_link" text:visited-style-name="Visited_20_Internet_20_Link"><text:span text:style-name="T1">ESPHome API Component</text:span></text:a><text:span text:style-name="T1"> to automatically receive state push notifications from your Home Assistant instance over the local network. [</text:span><text:a xlink:type="simple" xlink:href="https://community.home-assistant.io/t/read-control-ha-from-esphome/640276" text:style-name="Internet_20_link" text:visited-style-name="Visited_20_Internet_20_Link"><text:span text:style-name="T1">1</text:span></text:a><text:span text:style-name="T1">, </text:span><text:a xlink:type="simple" xlink:href="https://community.home-assistant.io/t/change-ha-entity-from-esphome/968118" text:style-name="Internet_20_link" text:visited-style-name="Visited_20_Internet_20_Link"><text:span text:style-name="T1">2</text:span></text:a><text:span text:style-name="T1">]</text:span></text:p>
      <text:p text:style-name="P3"/>
      <text:p text:style-name="P18"><text:span text:style-name="T1">1. Monitoring Numeric Entities (Sensors / Input Numbers)</text:span></text:p>
      <text:p text:style-name="P18"><text:span text:style-name="T1">Use the </text:span><text:span text:style-name="Source_20_Text"><text:span text:style-name="T1">sensor</text:span></text:span><text:span text:style-name="T1"> component with a </text:span><text:span text:style-name="Source_20_Text"><text:span text:style-name="T1">homeassistant</text:span></text:span><text:span text:style-name="T1"> platform. The </text:span><text:span text:style-name="Source_20_Text"><text:span text:style-name="T1">on_value</text:span></text:span><text:span text:style-name="T1"> automation block triggers every time the number shifts. [</text:span><text:a xlink:type="simple" xlink:href="https://community.home-assistant.io/t/esp-custom-component-how-to-get-entity-values-from-home-assistant/489261" text:style-name="Internet_20_link" text:visited-style-name="Visited_20_Internet_20_Link"><text:span text:style-name="T1">1</text:span></text:a><text:span text:style-name="T1">, </text:span><text:a xlink:type="simple" xlink:href="https://esphome.io/components/sensor/homeassistant/" text:style-name="Internet_20_link" text:visited-style-name="Visited_20_Internet_20_Link"><text:span text:style-name="T1">2</text:span></text:a><text:span text:style-name="T1">]</text:span></text:p>
      <text:p text:style-name="P12">yaml</text:p>
      <text:p text:style-name="Preformatted_20_Text"><text:span text:style-name="Source_20_Text">sensor:</text:span></text:p>
      <text:p text:style-name="Preformatted_20_Text"><text:span text:style-name="Source_20_Text"><text:s text:c="2"/>- platform: homeassistant</text:span></text:p>
      <text:p text:style-name="Preformatted_20_Text"><text:span text:style-name="Source_20_Text"><text:s text:c="4"/>id: ha_room_temperature</text:span></text:p>
      <text:p text:style-name="Preformatted_20_Text"><text:span text:style-name="Source_20_Text"><text:s text:c="4"/>entity_id: sensor.living_room_temperature # The real HA entity ID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his block triggers whenever the temperature changes</text:span></text:p>
      <text:p text:style-name="Preformatted_20_Text"><text:span text:style-name="Source_20_Text"><text:s text:c="4"/>on_value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</text:span></text:p>
      <text:p text:style-name="Preformatted_20_Text"><text:span text:style-name="Source_20_Text"><text:s text:c="12"/>format: "The Home Assistant temperature changed to %.1f °C"</text:span></text:p>
      <text:p text:style-name="Preformatted_20_Text"><text:span text:style-name="Source_20_Text"><text:s text:c="12"/>args: [ 'x' ] # 'x' represents the new state value</text:span></text:p>
      <text:p text:style-name="P13">2. Monitoring On/Off Entities (Switches / Lights / Binary Sensors)</text:p>
      <text:p text:style-name="P18"><text:span text:style-name="T1">For boolean conditions, map the entity into an ESPHome </text:span><text:span text:style-name="Source_20_Text"><text:span text:style-name="T1">binary_sensor</text:span></text:span><text:span text:style-name="T1"> component. Use </text:span><text:span text:style-name="Source_20_Text"><text:span text:style-name="T1">on_state</text:span></text:span><text:span text:style-name="T1"> to execute actions based on true/false changes. [</text:span><text:a xlink:type="simple" xlink:href="https://community.home-assistant.io/t/how-change-a-entity-status-from-c-code-in-a-custom-component/502186" text:style-name="Internet_20_link" text:visited-style-name="Visited_20_Internet_20_Link"><text:span text:style-name="T1">1</text:span></text:a><text:span text:style-name="T1">]</text:span></text:p>
      <text:p text:style-name="P12">yaml</text:p>
      <text:p text:style-name="Preformatted_20_Text"><text:span text:style-name="Source_20_Text">binary_sensor:</text:span></text:p>
      <text:p text:style-name="Preformatted_20_Text"><text:span text:style-name="Source_20_Text"><text:s text:c="2"/>- platform: homeassistant</text:span></text:p>
      <text:p text:style-name="Preformatted_20_Text"><text:span text:style-name="Source_20_Text"><text:s text:c="4"/>id: ha_security_status</text:span></text:p>
      <text:p text:style-name="Preformatted_20_Text"><text:span text:style-name="Source_20_Text"><text:s text:c="4"/>entity_id: binary_sensor.house_alarm_armed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riggers on any state toggle (Armed &lt;-&gt; Disarmed)</text:span></text:p>
      <text:p text:style-name="Preformatted_20_Text"><text:span text:style-name="Source_20_Text"><text:s text:c="4"/>on_state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 "Alarm state changed!"</text:span></text:p>
      <text:p text:style-name="Preformatted_20_Text"><text:span text:style-name="Source_20_Text"><text:s text:c="8"/></text:span></text:p>
      <text:p text:style-name="Preformatted_20_Text"><text:span text:style-name="Source_20_Text"><text:s text:c="4"/># Triggers specifically when switching to an 'on' (Armed) state</text:span></text:p>
      <text:p text:style-name="Preformatted_20_Text"><text:span text:style-name="Source_20_Text"><text:s text:c="4"/>on_press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ight.turn_on: alarm_indicator_led</text:span></text:p>
      <text:p text:style-name="Preformatted_20_Text">Vær forsigtig med at bruge denne kode.</text:p>
      <text:p text:style-name="P13">3. Monitoring Complex Entities (Strings / Text Helpers)</text:p>
      <text:p text:style-name="P18"><text:span text:style-name="T1">If you need to track textual or structural variables like an </text:span><text:span text:style-name="Source_20_Text"><text:span text:style-name="T1">input_select</text:span></text:span><text:span text:style-name="T1"> or specific entity attributes, use a text sensor. [</text:span><text:a xlink:type="simple" xlink:href="https://community.home-assistant.io/t/help-writing-my-first-template-lambda/298358" text:style-name="Internet_20_link" text:visited-style-name="Visited_20_Internet_20_Link"><text:span text:style-name="T1">1</text:span></text:a><text:span text:style-name="T1">]</text:span></text:p>
      <text:p text:style-name="P12">yaml</text:p>
      <text:p text:style-name="Preformatted_20_Text"><text:span text:style-name="Source_20_Text">text_sensor:</text:span></text:p>
      <text:p text:style-name="Preformatted_20_Text"><text:span text:style-name="Source_20_Text"><text:s text:c="2"/>- platform: homeassistant</text:span></text:p>
      <text:p text:style-name="Preformatted_20_Text"><text:span text:style-name="Source_20_Text"><text:s text:c="4"/>id: ha_house_mode</text:span></text:p>
      <text:p text:style-name="Preformatted_20_Text"><text:span text:style-name="Source_20_Text"><text:s text:c="4"/>entity_id: input_select.house_mod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riggers when a text state alters</text:span></text:p>
      <text:p text:style-name="Preformatted_20_Text"><text:span text:style-name="Source_20_Text"><text:s text:c="4"/>on_value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</text:span></text:p>
      <text:p text:style-name="Preformatted_20_Text"><text:soft-page-break/><text:span text:style-name="Source_20_Text"><text:s text:c="12"/>format: "House mode is now: %s"</text:span></text:p>
      <text:p text:style-name="Preformatted_20_Text"><text:span text:style-name="Source_20_Text"><text:s text:c="12"/>args: [ 'x.c_str()' ] # 'x' is a C++ string</text:span></text:p>
      <text:p text:style-name="P3"/>
      <text:p text:style-name="P12">🛠️ Important Configuration Tips</text:p>
      <text:list text:style-name="L1">
        <text:list-item>
          <text:p text:style-name="P16"><text:span text:style-name="Strong_20_Emphasis"><text:span text:style-name="T1">Internal Flag</text:span></text:span><text:span text:style-name="T1">: By default, entities imported from Home Assistant are automatically set to </text:span><text:span text:style-name="Source_20_Text"><text:span text:style-name="T1">internal: true</text:span></text:span><text:span text:style-name="T1">. This cleanly prevents ESPHome from creating a duplicate loop entity and pushing it straight back into Home Assistant. [</text:span><text:a xlink:type="simple" xlink:href="https://esphome.io/components/sensor/homeassistant/" text:style-name="Internet_20_link" text:visited-style-name="Visited_20_Internet_20_Link"><text:span text:style-name="T1">1</text:span></text:a><text:span text:style-name="T1">]</text:span></text:p>
        </text:list-item>
        <text:list-item>
          <text:p text:style-name="P16"><text:span text:style-name="Strong_20_Emphasis"><text:span text:style-name="T1">Boot Synchronization</text:span></text:span><text:span text:style-name="T1">: When your ESP device boots up or reconnects to your network, it will temporarily show </text:span><text:span text:style-name="Source_20_Text"><text:span text:style-name="T1">NaN</text:span></text:span><text:span text:style-name="T1"> (Not a Number) or </text:span><text:span text:style-name="Source_20_Text"><text:span text:style-name="T1">unknown</text:span></text:span><text:span text:style-name="T1"> until it pairs with the ESPHome API. Ensure your code accounts for initial boot delays if you use values inside </text:span><text:span text:style-name="Source_20_Text"><text:span text:style-name="T1">lambda</text:span></text:span><text:span text:style-name="T1"> formulas. [</text:span><text:a xlink:type="simple" xlink:href="https://community.home-assistant.io/t/having-an-esphome-device-update-a-home-assistant-helper-toggle/650116" text:style-name="Internet_20_link" text:visited-style-name="Visited_20_Internet_20_Link"><text:span text:style-name="T1">1</text:span></text:a><text:span text:style-name="T1">, </text:span><text:a xlink:type="simple" xlink:href="https://community.home-assistant.io/t/restoring-state-from-ha-when-api-reconnects/987639" text:style-name="Internet_20_link" text:visited-style-name="Visited_20_Internet_20_Link"><text:span text:style-name="T1">2</text:span></text:a><text:span text:style-name="T1">]</text:span></text:p>
        </text:list-item>
        <text:list-item>
          <text:p text:style-name="P17"><text:span text:style-name="Strong_20_Emphasis"><text:span text:style-name="T1">Attributes</text:span></text:span><text:span text:style-name="T1">: You can track metadata values instead of the main state by adding the </text:span><text:span text:style-name="Source_20_Text"><text:span text:style-name="T1">attribute:</text:span></text:span><text:span text:style-name="T1"> configuration property under your platform entry. [</text:span><text:a xlink:type="simple" xlink:href="https://esphome.io/components/sensor/homeassistant/" text:style-name="Internet_20_link" text:visited-style-name="Visited_20_Internet_20_Link"><text:span text:style-name="T1">1</text:span></text:a><text:span text:style-name="T1">]</text:span></text:p>
        </text:list-item>
      </text:list>
      <text:p text:style-name="P18"><text:span text:style-name="T1">If you are building a specific automation rule based on this data, tell me </text:span><text:span text:style-name="Strong_20_Emphasis"><text:span text:style-name="T1">what type of Home Assistant entity</text:span></text:span><text:span text:style-name="T1"> you are trying to track and </text:span><text:span text:style-name="Strong_20_Emphasis"><text:span text:style-name="T1">what physical action</text:span></text:span><text:span text:style-name="T1"> your ESPHome hardware needs to execute. I can write the exact automation scripts you need.</text:span></text:p>
      <text:p text:style-name="P19"><text:span text:style-name="T1">AI-svar kan indeholde fejl. </text:span><text:a xlink:type="simple" xlink:href="https://support.google.com/websearch?p=aimode" text:style-name="Internet_20_link" text:visited-style-name="Visited_20_Internet_20_Link"><text:span text:style-name="T1">Få flere oplysninger</text:span>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true" fo:line-height="100%" fo:padding="0.15cm" fo:border="0.06pt solid #000000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.6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5:08:00.919125722</meta:creation-date>
    <dc:date>2026-07-10T15:15:59.863306466</dc:date>
    <meta:editing-duration>PT7M59S</meta:editing-duration>
    <meta:editing-cycles>2</meta:editing-cycles>
    <meta:generator>LibreOffice/7.6.4.1$Linux_X86_64 LibreOffice_project/e19e193f88cd6c0525a17fb7a176ed8e6a3e2aa1</meta:generator>
    <meta:document-statistic meta:table-count="0" meta:image-count="0" meta:object-count="0" meta:page-count="2" meta:paragraph-count="56" meta:word-count="463" meta:character-count="3166" meta:non-whitespace-character-count="2572"/>
  </office:meta>
</office:document-meta>
</file>