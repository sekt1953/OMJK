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Heading_20_1">
      <style:paragraph-properties fo:break-before="page"/>
      <style:text-properties officeooo:paragraph-rsid="0010bc1a"/>
    </style:style>
    <style:style style:name="P3" style:family="paragraph" style:parent-style-name="Standard">
      <style:text-properties officeooo:paragraph-rsid="000f457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paragraph-rsid="00131bbe"/>
    </style:style>
    <style:style style:name="P6" style:family="paragraph" style:parent-style-name="Footer">
      <style:paragraph-properties fo:text-align="center" style:justify-single-word="false"/>
      <style:text-properties officeooo:rsid="0014d714" officeooo:paragraph-rsid="0014d714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4579"/>
    </style:style>
    <style:style style:name="T3" style:family="text">
      <style:text-properties officeooo:rsid="00159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community.home-assistant.io/t/loop-through-a-comma-delimited-list/169086" text:style-name="Internet_20_link" text:visited-style-name="Visited_20_Internet_20_Link"><text:span text:style-name="T1">Loop through a comma delimited list</text:span></text:a></text:h>
      <text:p text:style-name="Quotations">Kilde: <text:line-break/><text:a xlink:type="simple" xlink:href="https://community.home-assistant.io/t/loop-through-a-comma-delimited-list/169086/16" text:style-name="Internet_20_link" text:visited-style-name="Visited_20_Internet_20_Link">https://community.home-assistant.io/t/loop-through-a-comma-delimited-list/169086/16</text:a></text:p>
      <text:p text:style-name="Standard">yes. I was suggesting hard coding it in an array, but now I understand what you mean. So back to your code above, double check that you are using std::string rather than just string or maybe throw in a using namespace std. See if that makes a difference. Aside from that, I’m not sure you can use stringstream on ESP32, but I could be wrong.</text:p>
      <text:h text:style-name="Heading_20_2" text:outline-level="2">Here’s it working with an array:</text:h>
      <text:p text:style-name="Preformatted_20_Text">sensor:</text:p>
      <text:p text:style-name="Preformatted_20_Text"><text:s text:c="2"/>- platform: template</text:p>
      <text:p text:style-name="Preformatted_20_Text"><text:s text:c="4"/>name: testing_test</text:p>
      <text:p text:style-name="Preformatted_20_Text"><text:s text:c="4"/>id: test_1</text:p>
      <text:p text:style-name="Preformatted_20_Text"><text:s text:c="4"/>lambda: |-</text:p>
      <text:p text:style-name="Preformatted_20_Text"><text:s text:c="6"/>std::string strArray[3] = { "09:00", "12:00", "13:00" };</text:p>
      <text:p text:style-name="Preformatted_20_Text"><text:s text:c="6"/>for ( std::string s : strArray ) {</text:p>
      <text:p text:style-name="Preformatted_20_Text"><text:s text:c="10"/>ESP_LOGD("test: ", "Array to string: %s", s.c_str());</text:p>
      <text:p text:style-name="Preformatted_20_Text"><text:s text:c="6"/>}</text:p>
      <text:p text:style-name="Preformatted_20_Text"><text:s text:c="6"/>return 1;</text:p>
      <text:p text:style-name="Standard">Which produces this output:</text:p>
      <text:p text:style-name="Preformatted_20_Text">[03:08:50][D][test: :182]: Array to string: 09:00</text:p>
      <text:p text:style-name="Preformatted_20_Text">[03:08:50][D][test: :182]: Array to string: 12:00</text:p>
      <text:p text:style-name="Preformatted_20_Text">[03:08:50][D][test: :182]: Array to string: 13:00</text:p>
      <text:p text:style-name="Preformatted_20_Text">[03:08:50][D][sensor:092]: 'testing_test': Sending state 1.00000 <text:s/>with 1 decimals of accuracy</text:p>
      <text:h text:style-name="Heading_20_2" text:outline-level="2">Second Edit:</text:h>
      <text:p text:style-name="Standard">I think this does what you want.</text:p>
      <text:p text:style-name="Preformatted_20_Text">text_sensor:</text:p>
      <text:p text:style-name="Preformatted_20_Text"><text:s text:c="2"/>- platform: homeassistant</text:p>
      <text:p text:style-name="Preformatted_20_Text"><text:s text:c="4"/>name: "hatext"</text:p>
      <text:p text:style-name="Preformatted_20_Text"><text:s text:c="4"/>entity_id: input_text.text1</text:p>
      <text:p text:style-name="Preformatted_20_Text"><text:s text:c="4"/>id: hatext</text:p>
      <text:p text:style-name="Preformatted_20_Text"/>
      <text:p text:style-name="Preformatted_20_Text"><text:s text:c="2"/>- platform: template</text:p>
      <text:p text:style-name="Preformatted_20_Text"><text:s text:c="4"/>name: testing_test2</text:p>
      <text:p text:style-name="Preformatted_20_Text"><text:s text:c="4"/>id: test_2</text:p>
      <text:p text:style-name="Preformatted_20_Text"><text:s text:c="4"/>update_interval: 10s</text:p>
      <text:p text:style-name="Preformatted_20_Text"><text:s text:c="4"/>lambda: |-</text:p>
      <text:p text:style-name="Preformatted_20_Text"><text:s text:c="6"/>std::string str = id(hatext).state;</text:p>
      <text:p text:style-name="Preformatted_20_Text"><text:s text:c="6"/>std::vector&lt;std::string&gt; v;</text:p>
      <text:p text:style-name="Preformatted_20_Text"><text:s text:c="6"/>char * token;</text:p>
      <text:p text:style-name="Preformatted_20_Text"><text:s text:c="6"/>char seps[] = ",";</text:p>
      <text:p text:style-name="Preformatted_20_Text"><text:s text:c="6"/>token = strtok (&amp;str[0],seps);</text:p>
      <text:p text:style-name="Preformatted_20_Text"><text:s text:c="6"/>while (token != NULL)</text:p>
      <text:p text:style-name="Preformatted_20_Text"><text:s text:c="6"/>{</text:p>
      <text:p text:style-name="Preformatted_20_Text"><text:s text:c="8"/>v.push_back(token);</text:p>
      <text:p text:style-name="Preformatted_20_Text"><text:s text:c="8"/>token = strtok (NULL, seps);</text:p>
      <text:p text:style-name="Preformatted_20_Text"><text:s text:c="6"/>}</text:p>
      <text:p text:style-name="Preformatted_20_Text"><text:s text:c="6"/>for ( std::string s : v ) {</text:p>
      <text:p text:style-name="Preformatted_20_Text"><text:s text:c="10"/>ESP_LOGD("test: ", "String to Vector: %s", s.c_str());</text:p>
      <text:p text:style-name="Preformatted_20_Text"><text:s text:c="6"/>}</text:p>
      <text:p text:style-name="Preformatted_20_Text"><text:s text:c="6"/>return 1;</text:p>
      <text:h text:style-name="P8" text:outline-level="2"/>
      <text:h text:style-name="P10" text:outline-level="3">Which outputs:</text:h>
      <text:p text:style-name="Preformatted_20_Text">[04:14:18][D][text_sensor:015]: 'hatext': Sending state '09:00,12:00,13:00'</text:p>
      <text:p text:style-name="Preformatted_20_Text">[04:14:20][D][test: :204]: String to Vector: 09:00</text:p>
      <text:p text:style-name="Preformatted_20_Text">[04:14:20][D][test: :204]: String to Vector: 12:00</text:p>
      <text:p text:style-name="Preformatted_20_Text">[04:14:20][D][test: :204]: String to Vector: 13:00</text:p>
      <text:p text:style-name="Preformatted_20_Text">[04:14:20][D][sensor:092]: 'testing_test2': Sending state 1.00000 <text:s/>with 1 decimals of accuracy</text:p>
      <text:p text:style-name="Preformatted_20_Text">[04:14:25][D][homeassistant.text_sensor:016]: 'input_text.text1': Got state '09:00,12:00,15:00'</text:p>
      <text:p text:style-name="Preformatted_20_Text">[04:14:25][D][text_sensor:015]: 'hatext': Sending state '09:00,12:00,15:00'</text:p>
      <text:p text:style-name="Preformatted_20_Text">[04:14:30][D][test: :204]: String to Vector: 09:00</text:p>
      <text:p text:style-name="Preformatted_20_Text">[04:14:30][D][test: :204]: String to Vector: 12:00</text:p>
      <text:p text:style-name="Preformatted_20_Text">[04:14:30][D][test: :204]: String to Vector: 15:00</text:p>
      <text:p text:style-name="Preformatted_20_Text">[04:14:30][D][sensor:092]: 'testing_test2': Sending state 1.00000 <text:s/>with 1 decimals of accuracy</text:p>
      <text:p text:style-name="Standard">BrianHanifin</text:p>
      <text:p text:style-name="Standard">Feb 2020</text:p>
      <text:p text:style-name="Standard">I love pushing the edges of my understanding of programming! This gives me the start I needed. Thank you! I will update you on my progress.</text:p>
      <text:p text:style-name="Preformatted_20_Text">[08:42:09][D][test: :1299]: String to Vector: 09:00</text:p>
      <text:p text:style-name="Preformatted_20_Text">[08:42:09][D][test: :1299]: String to Vector: 12:00</text:p>
      <text:p text:style-name="Preformatted_20_Text">[08:42:09][D][test: :1299]: String to Vector: 15:00</text:p>
      <text:p text:style-name="Standard">P.S. Soo… an error I was getting last night was from another lambda. It was late, I don’t understand how it happened, but I noticed I had a return id(id(ui_zone1_times).state).state; in the below text_sensor clip. I wonder how long that was the real issue, and what other code I tried would have worked.</text:p>
      <text:p text:style-name="Preformatted_20_Text"><text:s text:c="2"/># Retrieve list of times from the Home Assistant UI.</text:p>
      <text:p text:style-name="Preformatted_20_Text"><text:s text:c="2"/>- platform: homeassistant</text:p>
      <text:p text:style-name="Preformatted_20_Text"><text:s text:c="4"/>id: ui_zone1_times</text:p>
      <text:p text:style-name="Preformatted_20_Text"><text:s text:c="4"/>entity_id: input_text.irrigation_zone1_times</text:p>
      <text:p text:style-name="Preformatted_20_Text"><text:s text:c="4"/>on_value:</text:p>
      <text:p text:style-name="Preformatted_20_Text"><text:s text:c="6"/>then:</text:p>
      <text:p text:style-name="Preformatted_20_Text"><text:s text:c="6"/>- text_sensor.template.publish:</text:p>
      <text:p text:style-name="Preformatted_20_Text"><text:s text:c="10"/>id: irrigation_zone1_times</text:p>
      <text:p text:style-name="Preformatted_20_Text"><text:s text:c="10"/>state: !lambda "return id(ui_zone1_times).state;"</text:p>
      <text:p text:style-name="Standard">jlax47</text:p>
      <text:p text:style-name="Standard">Jared Scott</text:p>
      <text:p text:style-name="Standard">I’m glad it helped. I’m not sure I’d use it without some additional input checking because a poorly typed text input on HA could crash the whole thing, so just keep that in mind. But like I said, I’m glad I was able to help.</text:p>
      <text:h text:style-name="Heading_20_1" text:outline-level="1"/>
      <text:h text:style-name="P4" text:outline-level="1">AI - lambda .push_back()</text:h>
      <text:p text:style-name="P3">Når du kombinerer lambda-udtryk og .push_back() i C++, handler det typisk om ét af to scenarier: enten vil du gemme funktioner (lambdas) i en vektor, eller også vil du bruge en lambda til at tilføje elementer til en vektor.Herunder ser vi på begge anvendelser, samt en udbredt fejl du skal undgå.</text:p>
      <text:h text:style-name="Heading_20_2" text:outline-level="2">Scenario 1: Gem lambdas i en std::vector</text:h>
      <text:p text:style-name="P3">Hvert lambda-udtryk i C++ har en unik, unavngiven type. For at gemme flere lambdas i samme std::vector, skal du pakke dem ind i en fælles type som f.eks. std::function fra &lt;functional&gt;-biblioteket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functional&gt; // Påkrævet for std::function</text:p>
      <text:p text:style-name="Preformatted_20_Text"/>
      <text:p text:style-name="Preformatted_20_Text">int main() {</text:p>
      <text:p text:style-name="Preformatted_20_Text"><text:s text:c="4"/>// En vektor, der kan indeholde funktioner uden parametre, som returnerer void</text:p>
      <text:p text:style-name="Preformatted_20_Text"><text:s text:c="4"/>std::vector&lt;std::function&lt;void()&gt;&gt; funktioner;</text:p>
      <text:p text:style-name="Preformatted_20_Text"/>
      <text:p text:style-name="Preformatted_20_Text"><text:s text:c="4"/>// 1. Tilføj en simpel lambda med .push_back()</text:p>
      <text:p text:style-name="Preformatted_20_Text"><text:s text:c="4"/>funktioner.push_back([]() {</text:p>
      <text:p text:style-name="Preformatted_20_Text"><text:s text:c="8"/>std::cout &lt;&lt; "Hej fra den første lambda!" &lt;&lt; std::endl;</text:p>
      <text:p text:style-name="Preformatted_20_Text"><text:s text:c="4"/>});</text:p>
      <text:p text:style-name="Preformatted_20_Text"/>
      <text:p text:style-name="Preformatted_20_Text"><text:s text:c="4"/>// 2. Tilføj endnu en lambda</text:p>
      <text:p text:style-name="Preformatted_20_Text"><text:s text:c="4"/>funktioner.push_back([]() {</text:p>
      <text:p text:style-name="Preformatted_20_Text"><text:s text:c="8"/>std::cout &lt;&lt; "Hej fra den anden lambda!" &lt;&lt; std::endl;</text:p>
      <text:p text:style-name="Preformatted_20_Text"><text:s text:c="4"/>});</text:p>
      <text:p text:style-name="Preformatted_20_Text"/>
      <text:p text:style-name="Preformatted_20_Text"><text:s text:c="4"/>// Kør alle lambdas i vektoren</text:p>
      <text:p text:style-name="Preformatted_20_Text"><text:s text:c="4"/>for (auto&amp; f : funktioner) {</text:p>
      <text:p text:style-name="Preformatted_20_Text"><text:s text:c="8"/>f(); 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h text:style-name="Heading_20_2" text:outline-level="2">Scenario 2: Brug .push_back() inde i en lambda</text:h>
      <text:p text:style-name="P3">Hvis du vil ændre en eksisterende vektor inde fra en lambda, skal du huske at capture vektoren ved reference ([&amp;]).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std::vector&lt;int&gt; tal;</text:p>
      <text:p text:style-name="Preformatted_20_Text"/>
      <text:p text:style-name="Preformatted_20_Text"><text:s text:c="4"/>// [&amp;] fanger 'tal' ved reference, så ændringer bevares uden for lambdaen</text:p>
      <text:p text:style-name="Preformatted_20_Text"><text:s text:c="4"/>auto tilfoejElement = [&amp;tal](int x) {</text:p>
      <text:p text:style-name="Preformatted_20_Text"><text:s text:c="8"/>tal.push_back(x);</text:p>
      <text:p text:style-name="Preformatted_20_Text"><text:s text:c="4"/>};</text:p>
      <text:p text:style-name="Preformatted_20_Text"/>
      <text:p text:style-name="Preformatted_20_Text"><text:s text:c="4"/>tilfoejElement(10);</text:p>
      <text:p text:style-name="Preformatted_20_Text"><text:s text:c="4"/>tilfoejElement(20);</text:p>
      <text:p text:style-name="Preformatted_20_Text"/>
      <text:p text:style-name="Preformatted_20_Text"><text:s text:c="4"/>// Vektoren indeholder nu [10, 20]</text:p>
      <text:p text:style-name="Preformatted_20_Text"><text:s text:c="4"/>for (int n : tal) {</text:p>
      <text:p text:style-name="Preformatted_20_Text"><text:s text:c="8"/>std::cout &lt;&lt; n &lt;&lt; " ";</text:p>
      <text:p text:style-name="Preformatted_20_Text"><text:s text:c="4"/>}</text:p>
      <text:p text:style-name="Preformatted_20_Text">}</text:p>
      <text:h text:style-name="Heading_20_2" text:outline-level="2"><text:soft-page-break/>Klassisk fejl: Capture ved værdi ([=])</text:h>
      <text:p text:style-name="P3">Hvis du ved en fejl fanger vektoren ved værdi (eller skriver [tal]), laver lambdaen en kopi af vektoren. Det betyder:</text:p>
      <text:p text:style-name="P3"><text:span text:style-name="T2">1. </text:span>Du skal tilføje keywordet mutable efter parameterlisten, ellers vil koden slet ikke kompilere (da lambdas som udgangspunkt er const).</text:p>
      <text:p text:style-name="P3"><text:span text:style-name="T2">2. </text:span>Elementerne tilføjes kun til kopien inde i lambdaen. Så snart lambdaen har kørt, slettes kopien, og din oprindelige vektor forbliver tom.</text:p>
      <text:p text:style-name="P3">Hvilket af de to scenarier forsøger du at løse i din kode? Hvis du har en specifik fejlmeddelelse, kan jeg hjælpe dig med at fejlfinde syntaksen.</text:p>
      <text:p text:style-name="P3"/>
      <text:h text:style-name="P2" text:outline-level="1">AI - lambda strtok()</text:h>
      <text:p text:style-name="P3">I C++ bruger man typisk ikke strtok() direkte i en lambda, da strtok() stammer fra C og gemmer sin interne tilstand globalt. Det gør den tråd-usikker (not thread-safe) og svær at styre i moderne kode.</text:p>
      <text:p text:style-name="P3">Når folk kombinerer en lambda med streng-opdeling (tokenization), er det som regel for at pakke den rå C-funktionalitet ind i et sikkert, moderne C++-format.</text:p>
      <text:p text:style-name="P3">Her er to måder at forklare og løse det på:</text:p>
      <text:h text:style-name="Heading_20_2" text:outline-level="2">Scenario 1: Den moderne C++ måde (Uden strtok)</text:h>
      <text:p text:style-name="P3">I stedet for strtok bruger moderne C++ ofte std::stringstream og std::getline. Her er en lambda, der opdeler en streng og gemmer resultatet i en vektor ved hjælp af .push_back():</text:p>
      <text:h text:style-name="Heading_20_3" text:outline-level="3">cpp</text:h>
      <text:p text:style-name="Preformatted_20_Text">#include &lt;iostream&gt;</text:p>
      <text:p text:style-name="Preformatted_20_Text">#include &lt;vector&gt;</text:p>
      <text:p text:style-name="Preformatted_20_Text">#include &lt;string&gt;</text:p>
      <text:p text:style-name="Preformatted_20_Text">#include &lt;sstream&gt;</text:p>
      <text:p text:style-name="Preformatted_20_Text"/>
      <text:p text:style-name="Preformatted_20_Text">int main() {</text:p>
      <text:p text:style-name="Preformatted_20_Text"><text:s text:c="4"/>std::vector&lt;std::string&gt; ord;</text:p>
      <text:p text:style-name="Preformatted_20_Text"><text:s text:c="4"/>std::string tekst = "C++,lambda,strtok,forklaring";</text:p>
      <text:p text:style-name="Preformatted_20_Text"/>
      <text:p text:style-name="Preformatted_20_Text"><text:s text:c="4"/>// Lambda der opdeler en streng baseret på et skilletegn (delimiter)</text:p>
      <text:p text:style-name="Preformatted_20_Text"><text:s text:c="4"/>auto split = [&amp;ord](const std::string&amp; s, char skilletegn) {</text:p>
      <text:p text:style-name="Preformatted_20_Text"><text:s text:c="8"/>std::stringstream ss(s);</text:p>
      <text:p text:style-name="Preformatted_20_Text"><text:s text:c="8"/>std::string token;</text:p>
      <text:p text:style-name="Preformatted_20_Text"><text:s text:c="8"/>while (std::getline(ss, token, skilletegn)) {</text:p>
      <text:p text:style-name="Preformatted_20_Text"><text:s text:c="12"/>ord.push_back(token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// Kald lambdaen</text:p>
      <text:p text:style-name="Preformatted_20_Text"><text:s text:c="4"/>split(tekst, ',');</text:p>
      <text:p text:style-name="Preformatted_20_Text"/>
      <text:p text:style-name="Preformatted_20_Text"><text:s text:c="4"/>// Udskriv resultatet</text:p>
      <text:p text:style-name="Preformatted_20_Text"><text:s text:c="4"/>for (const auto&amp; o : ord) {</text:p>
      <text:p text:style-name="Preformatted_20_Text"><text:s text:c="8"/>std::cout &lt;&lt; o &lt;&lt; "\n";</text:p>
      <text:p text:style-name="Preformatted_20_Text"><text:s text:c="4"/>}</text:p>
      <text:p text:style-name="Preformatted_20_Text">}</text:p>
      <text:p text:style-name="P3"/>
      <text:h text:style-name="P9" text:outline-level="2">Scenario 2: Hvis du SKAL bruge strtok i en lambda</text:h>
      <text:p text:style-name="P3">Hvis du arbejder på et ældre system eller absolut vil bruge strtok(), skal du huske, at strtok() modificerer den originale streng (indsætter \0), og den kræver en char* (ikke en standard std::string).</text:p>
      <text:p text:style-name="P3">Her pakkes strtok ind i en lambda:</text:p>
      <text:h text:style-name="Heading_20_3" text:outline-level="3">cpp</text:h>
      <text:p text:style-name="Preformatted_20_Text">#include &lt;iostream&gt;</text:p>
      <text:p text:style-name="Preformatted_20_Text">#include &lt;cstring&gt; // Påkrævet for strtok</text:p>
      <text:p text:style-name="Preformatted_20_Text">#include &lt;vector&gt;</text:p>
      <text:p text:style-name="Preformatted_20_Text"/>
      <text:p text:style-name="Preformatted_20_Text">int main() {</text:p>
      <text:p text:style-name="Preformatted_20_Text"><text:s text:c="4"/>// Strengen skal være et char-array, da strtok ændrer i den</text:p>
      <text:p text:style-name="Preformatted_20_Text"><text:s text:c="4"/>char tekst[] = "Lær-at-bruge-lambdas";</text:p>
      <text:p text:style-name="Preformatted_20_Text"><text:s text:c="4"/>std::vector&lt;char*&gt; tokens;</text:p>
      <text:p text:style-name="Preformatted_20_Text"/>
      <text:p text:style-name="Preformatted_20_Text"><text:s text:c="4"/>// Lambda der modtager strengen og opdeler den</text:p>
      <text:p text:style-name="Preformatted_20_Text"><text:s text:c="4"/>auto tilfoejTokens = [&amp;tokens](char* str) {</text:p>
      <text:p text:style-name="Preformatted_20_Text"><text:s text:c="8"/>char* token = std::strtok(str, "-"); // Første kald</text:p>
      <text:p text:style-name="Preformatted_20_Text"><text:s text:c="8"/>while (token != nullptr) {</text:p>
      <text:p text:style-name="Preformatted_20_Text"><text:s text:c="12"/>tokens.push_back(token);</text:p>
      <text:p text:style-name="Preformatted_20_Text"><text:s text:c="12"/>token = std::strtok(nullptr, "-"); // Efterfølgende kald bruger nullptr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tilfoejTokens(tekst);</text:p>
      <text:p text:style-name="Preformatted_20_Text"/>
      <text:p text:style-name="Preformatted_20_Text"><text:s text:c="4"/>for (char* t : tokens) {</text:p>
      <text:p text:style-name="Preformatted_20_Text"><text:s text:c="8"/>std::cout &lt;&lt; t &lt;&lt; "\n";</text:p>
      <text:p text:style-name="Preformatted_20_Text"><text:s text:c="4"/>}</text:p>
      <text:p text:style-name="Preformatted_20_Text">}</text:p>
      <text:h text:style-name="Heading_20_3" text:outline-level="3">Hvorfor er strtok farlig i lambdas?</text:h>
      <text:p text:style-name="P3">Hvis du kalder en lambda, der bruger strtok(), fra to forskellige tråde samtidig, vil de ødelægge hinandens resultat. Det skyldes, at strtok() husker, hvor den kom til, i en skjult global variabel. Hvis du absolut vil bruge C-funktioner i trådede lambdas, skal du bruge den tradsikre variant strtok_r() (på POSIX/Linux) eller strtok_s() (på Windows).</text:p>
      <text:p text:style-name="P3">Hvilken type skilletegn (delimiter) forsøger du at opdele din streng med, og skal koden køre i et multithreaded miljø?</text:p>
      <text:p text:style-name="P3"/>
      <text:h text:style-name="P4" text:outline-level="1"><text:span text:style-name="T3">H</text:span>ow to test if string ar are equal</text:h>
      <text:p text:style-name="P5">In ESPHome, you can test if strings are equal using native YAML conditions or within C++ lambda blocks. </text:p>
      <text:h text:style-name="Heading_20_2" text:outline-level="2">Native YAML Condition (No Code)</text:h>
      <text:p text:style-name="P5">The easiest way to compare a text_sensor state to a static string is using the native <text:a xlink:type="simple" xlink:href="https://esphome.io/components/text_sensor/" text:style-name="Internet_20_link" text:visited-style-name="Visited_20_Internet_20_Link">ESPHome text_sensor.state condition:</text:a></text:p>
      <text:h text:style-name="Heading_20_3" text:outline-level="3">yaml</text:h>
      <text:p text:style-name="Preformatted_20_Text">on_value:</text:p>
      <text:p text:style-name="Preformatted_20_Text"><text:s text:c="2"/>- if:</text:p>
      <text:p text:style-name="Preformatted_20_Text"><text:s text:c="6"/>condition:</text:p>
      <text:p text:style-name="Preformatted_20_Text"><text:s text:c="8"/>text_sensor.state:</text:p>
      <text:p text:style-name="Preformatted_20_Text"><text:s text:c="10"/>id: my_text_sensor</text:p>
      <text:p text:style-name="Preformatted_20_Text"><text:s text:c="10"/>state: "Hello World"</text:p>
      <text:p text:style-name="Preformatted_20_Text"><text:s text:c="6"/>then:</text:p>
      <text:p text:style-name="Preformatted_20_Text"><text:s text:c="8"/>- logger.log: "Strings match!"</text:p>
      <text:h text:style-name="Heading_20_2" text:outline-level="2">Inside a C++ Lambda</text:h>
      <text:p text:style-name="P5">If you are writing custom logic inside a lambda, you have three main ways to check for equality depending on the data type:</text:p>
      <text:h text:style-name="Heading_20_3" text:outline-level="3">1. Using Standard Equality == (Recommended) </text:h>
      <text:p text:style-name="P5">ESPHome's internal state variables and standard strings (std::string) natively support the == operator: </text:p>
      <text:h text:style-name="Heading_20_4" text:outline-level="4">yaml</text:h>
      <text:p text:style-name="Preformatted_20_Text">lambda: |-</text:p>
      <text:p text:style-name="Preformatted_20_Text"><text:s text:c="2"/>if (id(my_text_sensor).state == "Hello World") {</text:p>
      <text:p text:style-name="Preformatted_20_Text"><text:s text:c="4"/>// Strings are equal</text:p>
      <text:p text:style-name="Preformatted_20_Text"><text:s text:c="2"/>}</text:p>
      <text:h text:style-name="Heading_20_3" text:outline-level="3">2. Case-Insensitive Comparison</text:h>
      <text:p text:style-name="P5">If you need to check if strings match regardless of uppercase or lowercase letters, use ESPHome's built-in helper: </text:p>
      <text:h text:style-name="Heading_20_4" text:outline-level="4">yaml</text:h>
      <text:p text:style-name="Preformatted_20_Text">lambda: |-</text:p>
      <text:p text:style-name="Preformatted_20_Text"><text:s text:c="2"/>if (str_equals_case_insensitive(id(my_text_sensor).state, "hello world")) {</text:p>
      <text:p text:style-name="Preformatted_20_Text"><text:s text:c="4"/>// Strings match (e.g., "Hello World", "HELLO WORLD", etc.)</text:p>
      <text:p text:style-name="Preformatted_20_Text"><text:s text:c="2"/>}</text:p>
      <text:h text:style-name="Heading_20_3" text:outline-level="3">3. Comparing C-Style Strings (char*)</text:h>
      <text:p text:style-name="P5">If you are working with raw character arrays (C-style strings) rather than ESPHome sensor states, the == operator will not work because it compares memory addresses. Instead, use the standard C function strcmp(): </text:p>
      <text:h text:style-name="Heading_20_4" text:outline-level="4">yaml</text:h>
      <text:p text:style-name="Preformatted_20_Text">lambda: |-</text:p>
      <text:p text:style-name="Preformatted_20_Text"><text:s text:c="2"/>const char* str1 = "test";</text:p>
      <text:p text:style-name="Preformatted_20_Text"><text:s text:c="2"/>// Convert ESPHome state to a C-string using .c_str()</text:p>
      <text:p text:style-name="Preformatted_20_Text"><text:s text:c="2"/>if (strcmp(str1, id(my_text_sensor).state.c_str()) == 0) {</text:p>
      <text:p text:style-name="Preformatted_20_Text"><text:s text:c="4"/>// strcmp returns 0 if the strings are identical</text:p>
      <text:p text:style-name="Preformatted_20_Text"><text:s text:c="2"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true" fo:padding="0.15cm" fo:border="0.06pt solid #000000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1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01cm" fo:margin-bottom="0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d714" officeooo:paragraph-rsid="0014d714"/>
    </style:style>
    <style:page-layout style:name="Mpm1">
      <style:page-layout-properties fo:page-width="21.001cm" fo:page-height="29.7cm" style:num-format="1" style:print-orientation="portrait" fo:margin-top="0.6cm" fo:margin-bottom="0.6cm" fo:margin-left="1.6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Side <text:bookmark-start text:name="PageNumWizard_FOOTER_Default Page Style1"/><text:page-number text:select-page="current">5</text:page-number><text:bookmark-end text:name="PageNumWizard_FOOTER_Default Page Style1"/><text:s/>of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08:58:20.867547872</meta:creation-date>
    <dc:date>2026-07-13T13:10:24.868430574</dc:date>
    <meta:editing-duration>PT2H5M34S</meta:editing-duration>
    <meta:editing-cycles>11</meta:editing-cycles>
    <meta:generator>LibreOffice/7.6.4.1$Linux_X86_64 LibreOffice_project/e19e193f88cd6c0525a17fb7a176ed8e6a3e2aa1</meta:generator>
    <meta:print-date>2026-07-11T09:06:56.894839923</meta:print-date>
    <meta:document-statistic meta:table-count="0" meta:image-count="0" meta:object-count="0" meta:page-count="7" meta:paragraph-count="219" meta:word-count="1456" meta:character-count="10128" meta:non-whitespace-character-count="8275"/>
  </office:meta>
</office:document-meta>
</file>